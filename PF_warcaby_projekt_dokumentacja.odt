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1f9b" officeooo:paragraph-rsid="00061f9b"/>
    </style:style>
    <style:style style:name="P2" style:family="paragraph" style:parent-style-name="Standard">
      <style:text-properties officeooo:rsid="00061f9b" officeooo:paragraph-rsid="000639ad"/>
    </style:style>
    <style:style style:name="P3" style:family="paragraph" style:parent-style-name="Standard">
      <style:text-properties officeooo:paragraph-rsid="00061f9b"/>
    </style:style>
    <style:style style:name="P4" style:family="paragraph" style:parent-style-name="Standard">
      <style:text-properties fo:font-size="10pt" officeooo:rsid="00061f9b" officeooo:paragraph-rsid="000639ad" style:font-size-asian="10pt" style:font-size-complex="10pt"/>
    </style:style>
    <style:style style:name="P5" style:family="paragraph" style:parent-style-name="Standard">
      <style:text-properties officeooo:rsid="000639ad" officeooo:paragraph-rsid="000639ad"/>
    </style:style>
    <style:style style:name="P6" style:family="paragraph" style:parent-style-name="Standard">
      <style:text-properties officeooo:paragraph-rsid="000639ad"/>
    </style:style>
    <style:style style:name="P7" style:family="paragraph" style:parent-style-name="Standard">
      <style:text-properties officeooo:rsid="00073e99" officeooo:paragraph-rsid="00073e99"/>
    </style:style>
    <style:style style:name="P8" style:family="paragraph" style:parent-style-name="Standard" style:list-style-name="L2">
      <style:text-properties officeooo:rsid="0007ab17" officeooo:paragraph-rsid="0007ab17"/>
    </style:style>
    <style:style style:name="P9" style:family="paragraph" style:parent-style-name="Standard" style:list-style-name="L2">
      <style:text-properties officeooo:rsid="0007ab17" officeooo:paragraph-rsid="0008e8a3"/>
    </style:style>
    <style:style style:name="P10" style:family="paragraph" style:parent-style-name="Standard" style:list-style-name="L2">
      <style:text-properties officeooo:rsid="0007ab17" officeooo:paragraph-rsid="000c39de"/>
    </style:style>
    <style:style style:name="P11" style:family="paragraph" style:parent-style-name="Standard">
      <style:text-properties officeooo:rsid="0007ab17" officeooo:paragraph-rsid="0007ab17"/>
    </style:style>
    <style:style style:name="P12" style:family="paragraph" style:parent-style-name="Standard">
      <style:text-properties officeooo:rsid="0007c94e" officeooo:paragraph-rsid="0007c94e"/>
    </style:style>
    <style:style style:name="P13" style:family="paragraph" style:parent-style-name="Standard">
      <style:text-properties officeooo:rsid="000fc526" officeooo:paragraph-rsid="000fc526"/>
    </style:style>
    <style:style style:name="P14" style:family="paragraph" style:parent-style-name="Standard" style:list-style-name="L2">
      <style:text-properties officeooo:rsid="00123ff8" officeooo:paragraph-rsid="00123ff8"/>
    </style:style>
    <style:style style:name="T1" style:family="text">
      <style:text-properties officeooo:rsid="00061f9b"/>
    </style:style>
    <style:style style:name="T2" style:family="text">
      <style:text-properties officeooo:rsid="000639ad"/>
    </style:style>
    <style:style style:name="T3" style:family="text">
      <style:text-properties officeooo:rsid="00073e99"/>
    </style:style>
    <style:style style:name="T4" style:family="text">
      <style:text-properties officeooo:rsid="0007ab17"/>
    </style:style>
    <style:style style:name="T5" style:family="text">
      <style:text-properties officeooo:rsid="0007c94e"/>
    </style:style>
    <style:style style:name="T6" style:family="text">
      <style:text-properties officeooo:rsid="0008e8a3"/>
    </style:style>
    <style:style style:name="T7" style:family="text">
      <style:text-properties officeooo:rsid="000a910b"/>
    </style:style>
    <style:style style:name="T8" style:family="text">
      <style:text-properties officeooo:rsid="000c39de"/>
    </style:style>
    <style:style style:name="T9" style:family="text">
      <style:text-properties officeooo:rsid="000d624b"/>
    </style:style>
    <style:style style:name="T10" style:family="text">
      <style:text-properties officeooo:rsid="00112724"/>
    </style:style>
    <style:style style:name="T11" style:family="text">
      <style:text-properties officeooo:rsid="00123ff8"/>
    </style:style>
    <style:style style:name="T12" style:family="text">
      <style:text-properties officeooo:rsid="001253dc"/>
    </style:style>
    <style:style style:name="T13" style:family="text">
      <style:text-properties officeooo:rsid="001396cc"/>
    </style:style>
    <style:style style:name="T14" style:family="text">
      <style:text-properties officeooo:rsid="00170c1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funkcyjne – Warcaby w Pythonie</text:p>
      <text:p text:style-name="P13">Autor: Aleksandra Michalska</text:p>
      <text:p text:style-name="P1"/>
      <text:p text:style-name="P3"><text:span text:style-name="T1">Niniejsza dokumentacja opisuje budowę kodu umożliwiającego rozgrywkę gry w warcaby ze sztuczną inteligencją. </text:span><text:span text:style-name="T3">Do podejmowania decyzji przez komputer został użyty algorytm minimax z parametrami alfa-beta dla przyspieszenia działania. Głębokość przeszukiwania wynosi 3.</text:span></text:p>
      <text:p text:style-name="P3"/>
      <text:p text:style-name="P1">1. Wygląd gry z perspektywy użytkownika</text:p>
      <text:p text:style-name="P1">Gra ma formę tekstową – plansza jest wyświetlana przy użyciu symboli klawiatury a interakcja z graczem polega na zapytaniach o wprowadzenie tekstu i interpretowanie go.</text:p>
      <text:p text:style-name="P1">Po uruchomieniu programu użytkownik może zdecydować, czy to on zaczyna grę. Wyświetli się plansza początkowa. <text:span text:style-name="T2">Rzędy i kolumny są ponumerowane.</text:span></text:p>
      <text:p text:style-name="P2">Następnie rozpoczyna się cykl kolejek, zapoczątkowany ruchem gracza lub komputera, w zależności od decyzji użytkownika. W trakcie kolejki komputera, po wyświetleniu informacji „Kolej komputera” nastąpią dwie sekundy przerwy, po których na ekranie wyświetli się nowa plansza, z przestawionym pionkiem komputera. <text:span text:style-name="T2">Zbite pionki znikają z planszy. </text:span>Natomiast, gdy jest kolej gracza, <text:span text:style-name="T2">po informacji „Twoja kolej”</text:span> zobaczy on listę możliwych ruchów. Ta lista zawiera tylko ruchy z największą liczbą zbić, jaką da się w tej chwili osiągnąć. <text:span text:style-name="T2">Ruchy są ponumerowane, a wybór polega na wprowadzeniu numeru. Ruchy oznaczane są tak: </text:span></text:p>
      <text:p text:style-name="P4"><text:span text:style-name="T2">(rząd pola startowego, kolumna pola startowego) → (rząd pola końcowego, kolumna pola końcowego)</text:span></text:p>
      <text:p text:style-name="P5">Gdy ruch zostanie wybrany, pokaże się plansza z wprowadzonym przesunięciem i usuniętymi zbitymi pionkami.</text:p>
      <text:p text:style-name="P5">W każdej chwili gracz może wprowadzić „q” zamiast wymaganego wejścia i zakończyć grę. Jeśli wejście nie jest ani wymaganą wartością, ani „q”, gra poprosi o powtórzenie wprowadzania. Gra kończy się automatycznie, gdy komputer lub gracz straci wszystkie pionki, a na ekranie wypisze się informacja, kto wygrał.</text:p>
      <text:p text:style-name="P5"/>
      <text:p text:style-name="P1">2. Przyjęte założenia dotyczące gry</text:p>
      <text:p text:style-name="P5">Pionki komputera ustawione są na górze planszy a pionki gracza na dole, ponieważ przybliża to perspektywę, z jaką gracz widziałby planszę w rzeczywistości. Pionek komputera oznaczamy „K” a pionki gracza „G”. Jeżeli pionek dotrze do przeciwnej krawędzi, zamienia się w damkę i do symbolu pionka zostaje dostawiona litera „D”, a zatem powstaje „DK” lub „DG”.</text:p>
      <text:p text:style-name="P5">Damka wykonuje ruch wzdłuż jednej z przekątnych, bez zmieniania kierunku, a jeśli przeskoczy jakieś pionki przeciwnika, zbije je. Ta zasada oznacza, że nawet podczas zbijania damka nie może na przykład zbić pionków przeciwnika w kierunku prawym dolnym a potem kolejnych w lewym dolnym. <text:span text:style-name="T3">Oczywiście w obrębie jednego ruchu.</text:span></text:p>
      <text:p text:style-name="P5">Nie może też przeskakiwać nad pionkami gracza, do którego należy.</text:p>
      <text:p text:style-name="P6"/>
      <text:p text:style-name="P1">3. Wykorzystanie paradygmatu funkcyjnego</text:p>
      <text:p text:style-name="P7">Paradygmat funkcyjny został użyty we wszystkich funkcjach, które <text:span text:style-name="T10">n</text:span>ie sterują rozgrywką. Powodem pozostawienia nieskończonych pętli w funkcjach sterujących jest zapobieganie nadmiernemu poziomowi zagnieżdżenia podczas wywołań rekursywnych. <text:span text:style-name="T11">A ponieważ zwolniono te funkcje z przestrzegania paradygmatu, jest tam wykorzystywane również nadpisywanie zmiennej globalnej z planszą.</text:span></text:p>
      <text:p text:style-name="P7"/>
      <text:p text:style-name="P11">4. Objaśnienie kodowania ruchów i skoków (bić)</text:p>
      <text:p text:style-name="P11">Ruch: (rząd pola startowego, kolumna pola startowego, rząd pola końcowego, <text:span text:style-name="T5">kolumna pola końcowego</text:span>, <text:span text:style-name="T5">plansza po ruchu</text:span>, <text:span text:style-name="T5">pionki zbite w ruchu</text:span>)</text:p>
      <text:p text:style-name="P12">Skok: (rząd pola końcowego, kolumna pola końcowego, plansza po ruchu, zbite pionki)</text:p>
      <text:p text:style-name="P12"/>
      <text:p text:style-name="P7"><text:span text:style-name="T4">5</text:span>. Spis funkcji w kodzi<text:span text:style-name="T4">e</text:span></text:p>
      <text:list xml:id="list2100849655" text:style-name="L2">
        <text:list-item>
          <text:p text:style-name="P8"><text:soft-page-break/>npc_turn(chart) – dla planszy wyjściowej wywoła algorytm minimax alfa-beta i zwróci planszę po wybranej zmianie.</text:p>
        </text:list-item>
        <text:list-item>
          <text:p text:style-name="P8">player_turn(chart) – obsługa ruchu gracza. Tutaj wywoływany jest generator możliwych ruchów a rezultat generatora wyświetlany jest na ekranie. Następnie pozyskuje się od gracza wybór i zwraca planszę po wprowadzonej zmianie.</text:p>
        </text:list-item>
        <text:list-item>
          <text:p text:style-name="P8">print_chart(chart) – wyświetlenie planszy na ekranie.</text:p>
        </text:list-item>
        <text:list-item>
          <text:p text:style-name="P8">print_rows(chart, row_index) - <text:s/><text:span text:style-name="T14">wyświetlenie rzędów planszy.</text:span></text:p>
        </text:list-item>
        <text:list-item>
          <text:p text:style-name="P8">print_columns(row, column_index) – <text:span text:style-name="T14">wyświetlenie kolumien planszy w jednym rzędzie.</text:span></text:p>
        </text:list-item>
        <text:list-item>
          <text:p text:style-name="P8">string_numbers(number, end, list) – pomocnicza funkcja generująca listę numerów od 0 do podanej liczby końcowej, przy czym każdy numer ma typ string.</text:p>
        </text:list-item>
        <text:list-item>
          <text:p text:style-name="P8">filtered_possible_moves(chart, my_pawn) – filtruje wszystkie możliwe ruchy. Pozostawia tylko te z największą możliwą liczbą zbić. Zwraca przefiltrowaną listę ruchów.</text:p>
        </text:list-item>
        <text:list-item>
          <text:p text:style-name="P8">loop_possible_moves_captured(input_list, output_list, index) – dla podanej listy ruchów <text:span text:style-name="T6">zwróci listę liczb zbitych pionków każdego z ruchów.</text:span></text:p>
        </text:list-item>
        <text:list-item>
          <text:p text:style-name="P9">operator_questionmark(condition, iftrue, iffalse) – <text:span text:style-name="T7">pomocniczy </text:span><text:span text:style-name="T6">operator ? :</text:span></text:p>
        </text:list-item>
        <text:list-item>
          <text:p text:style-name="P9">loop_filter_moves(input_list, output_list, index, max_captured) – <text:span text:style-name="T6">zasadnicza część funkcji filtered_possible_moves(). Ona generuje odfiltrowaną listę o maksymalnej liczbie zbitych pionków.</text:span></text:p>
        </text:list-item>
        <text:list-item>
          <text:p text:style-name="P9">possible_moves(chart, row, column, my_pawn, current_possibles, is_jumping) – <text:span text:style-name="T6">generuje wszystkie możliwe ruchy przechodząc po wszystkich polach planszy. Dla damek wywołuje generator ruchów damki. Jeżeli pionek jest zwyczajny, najpierw spróbuje wygenerować dla niego bicia. Jeżeli żadnych jego bić nie ma, oraz dotychczas nie wygenerowano dla poprzednich pionków bić, zostaną wygenerowane zwykłe ruchy pionka.</text:span></text:p>
        </text:list-item>
        <text:list-item>
          <text:p text:style-name="P9"><text:span text:style-name="T7">l</text:span>oop_possible_jump_moves(chart, adjacent, index_adjacent, my_pawn, checked_row, checked_column, new_possibles) – <text:span text:style-name="T7">zwróci listę możliwych ruchów bijących. </text:span></text:p>
        </text:list-item>
        <text:list-item>
          <text:p text:style-name="P9">jumps_to_moves(generated_jumps, jump_index, checked_row, checked_column, moves) – <text:span text:style-name="T7">przekształca krotki skoków na krotki ruchów, wzbogacając o dodatkowe dane.</text:span></text:p>
        </text:list-item>
        <text:list-item>
          <text:p text:style-name="P9">loop_plain_moves(chart, adjacent, adjacent_index, checked_row, checked_column, my_pawn, new_possibles) – <text:span text:style-name="T7">wygeneruje wszystkie możliwe ruchy bez bicia dla zwykłego pionka, czyli pojedyncze przesunięcia zgodnie z kierunkiem gry.</text:span></text:p>
        </text:list-item>
        <text:list-item>
          <text:p text:style-name="P9">possible_D_moves(chart, start_row, start_column, my_pawn) – <text:span text:style-name="T7">generuje wszystkie możliwe ruchy damki w czterech kierunkach.</text:span></text:p>
        </text:list-item>
        <text:list-item>
          <text:p text:style-name="P9">moves_diagonally_with_preprocess(chart, start_row, start_column, my_pawn, step_r, step_c) – <text:span text:style-name="T7">generuje ruchy we wzkazanym jednym z czterech kierunków. Zaczyna od listy będącej kolejnymi polami przekątnej. Preprocessing polega na skróceniu tej </text:span><text:span text:style-name="T8">przekątnej</text:span><text:span text:style-name="T7"> do pierwszego najbliższego pionka właściciela damki, wyłącznie. Później przycina się przekątną do pierwszego od końca pustego pola, włącznie. Na końcu wywołana jest funkcja generująca ruchy damki na skróconej przekątnej.</text:span></text:p>
        </text:list-item>
        <text:list-item>
          <text:p text:style-name="P10">decrease_1(first_occurence_pawn, first_occurence_D, diagonal) – <text:span text:style-name="T8">s</text:span><text:span text:style-name="T7">króceni</text:span><text:span text:style-name="T8">e przekątnej </text:span><text:span text:style-name="T7">do pierwszego najbliższego pionka właściciela damki, wyłącznie.</text:span></text:p>
        </text:list-item>
        <text:list-item>
          <text:p text:style-name="P10">decrease_2(diagonal, index) - <text:s/><text:span text:style-name="T8">skrócenie przekątnej do pierwszego od końca wolnego pola, włącznie.</text:span></text:p>
        </text:list-item>
        <text:list-item>
          <text:p text:style-name="P10">find_pawn(pawn, list) – <text:span text:style-name="T8">pomocnicza funkcja, która</text:span> <text:span text:style-name="T8">zwraca indeks pionka na liście lub -1 jeśli pionka na niej nie ma.</text:span></text:p>
        </text:list-item>
        <text:list-item>
          <text:p text:style-name="P10">moves_diagonally(chart, map, my_pawn, start_row, start_column, current_moves, index, r_multiplier, c_multiplier, captured) – <text:span text:style-name="T8">poczynając od końca, aż do napotkania pierwszego pionka lub początku przekątnej, produkuje możliwe ruchy damki.</text:span></text:p>
        </text:list-item>
        <text:list-item>
          <text:p text:style-name="P10">adjacent_f(checked_row, checked_column) – <text:span text:style-name="T8">zwraca listę pól stycznych do zadanego.</text:span></text:p>
        </text:list-item>
        <text:list-item>
          <text:p text:style-name="P10">jumping_moves(start_row, start_column, end_row, end_column, enemy_row, enemy_column, chart, captured, my_pawn) – <text:span text:style-name="T8">zwróci wszystkie ruchy bijące wywodzące się z pojedynczego skoku opisanego polem startowym, końcowym i polem zbitego przeciwnika.</text:span></text:p>
        </text:list-item>
        <text:list-item>
          <text:p text:style-name="P10"><text:soft-page-break/>loop_free_field_enemy_field(new_chart, adjacent, adjacent_index, my_pawn, end_row, end_column, pairs) – <text:span text:style-name="T8">bada pola styczne wokół zadanego, czy możliwy jest kolejny skok (czyli czy stykamy się z polem zajmowanym przez wroga i za wrogiem jest puste pole). Zwróci pary „pole wroga – pole puste za nim”.</text:span></text:p>
        </text:list-item>
        <text:list-item>
          <text:p text:style-name="P10">loop_generate_multiple_jumps(new_chart, captured, my_pawn, field_index, free_field_enemy_field, end_row, end_column, generated_jumps) – <text:span text:style-name="T8">umożliwia zebranie większej liczby możliwych bić wywodzących się od tego samego pojedynczego bicia początkowego. Wywoływana, gdy bicie numer dwa w tym samym ruchu można poczynić na więcej niż jeden sposób. Zwróci wszystkie skoki wywodzące się od początkowego bicia.</text:span></text:p>
        </text:list-item>
        <text:list-item>
          <text:p text:style-name="P10">get_field_behind(my_row, my_column, enemy_row, enemy_column) – <text:span text:style-name="T8">zwraca współrzędne pola za wrogiem.</text:span></text:p>
        </text:list-item>
        <text:list-item>
          <text:p text:style-name="P10">direction_ok(my_row, end_row, my_pawn) - <text:s/><text:span text:style-name="T8">sprawdza czy pionek może poruszyć się w tym kierunku.</text:span></text:p>
        </text:list-item>
        <text:list-item>
          <text:p text:style-name="P10">winner(chart) – <text:span text:style-name="T8">zwraca pionek zwycięzcy, lub „N”, jeśli nikt jeszcze nie wygrywa.</text:span></text:p>
        </text:list-item>
        <text:list-item>
          <text:p text:style-name="P10">count_pawns(chart, row_index, com_count, player_count) – <text:span text:style-name="T8">liczy pionki komputera oraz gracza osobno. Zwraca dwie liczby.</text:span></text:p>
        </text:list-item>
        <text:list-item>
          <text:p text:style-name="P10">ab(chart, my_symbol, symbol, depth, a, b) – <text:span text:style-name="T8">rozpoczęcie algorytmu minimax alfa-beta. Pozyskuje wszystkie dozwolone ruchy </text:span><text:span text:style-name="T9">i </text:span><text:span text:style-name="T8">uruchamia pętlę główną. </text:span><text:span text:style-name="T9">P</text:span><text:span text:style-name="T8">o pozyskaniu z niej planszy po wybranym ruchu </text:span><text:span text:style-name="T9">zwraca ją wraz z jednym z parametrów, alfa lub beta, w zależności czy na danym poziomie zagnieżdżenia komputer rozpatruje ruch dla siebie czy dla przeciwnika.</text:span></text:p>
        </text:list-item>
        <text:list-item>
          <text:p text:style-name="P10">main_loop_ab(successors_charts, successor_index, depth, my_symbol, symbol, chosen_move, a, b) – <text:span text:style-name="T8">funkcyjna reprezentacja iteracji w algorytmie minimax alfa-beta. </text:span><text:span text:style-name="T9">Dla wszystkich następców (plansz następczych), wywołujemy jeszcze raz ab() z mniejszym „depth”. Jeśli ab() zwróci alfa i jest ono większe niż dotychczasowe alfa, nowa iteracja zostaje wywołana z nadpisanym parametrem alfa. Jeżeli zwrócone zostaje beta i jest mniejsze niż dotychczasowe beta, nowa iteracja będzie mieć nadpisane beta.</text:span></text:p>
        </text:list-item>
        <text:list-item>
          <text:p text:style-name="P10">get_next_symbol(current_symbol) – <text:span text:style-name="T9">zwraca drugi symbol, inny niż zadany.</text:span></text:p>
        </text:list-item>
        <text:list-item>
          <text:p text:style-name="P10">extract_charts(charts, index, moves) – <text:span text:style-name="T9">pozyskuje z ruchów tylko plansze.</text:span></text:p>
        </text:list-item>
        <text:list-item>
          <text:p text:style-name="P10">state_assesment(chart, symbol) - obliczanie wartości liczbowej planszy z perspektywy gracza o danym symbolu.</text:p>
        </text:list-item>
        <text:list-item>
          <text:p text:style-name="P10">points_for_row(result, chart, row_index, mul1, mul2) – <text:span text:style-name="T9">sumuje wartości punktowe wszystkich rzędów planszy.</text:span></text:p>
        </text:list-item>
        <text:list-item>
          <text:p text:style-name="P10">is_d(my_pawn, arrived_row) – <text:span text:style-name="T9">ocenia, czy pionek stanie się damką.</text:span></text:p>
        </text:list-item>
        <text:list-item>
          <text:p text:style-name="P10"><text:s/>update_chart_jump(chart, start, enemy, end, pawn) – <text:span text:style-name="T12">zwraca planszę po biciu zwykłym <text:s text:c="2"/>pionkiem.</text:span></text:p>
        </text:list-item>
        <text:list-item>
          <text:p text:style-name="P10">update_chart_D(chart, start_row, start_column, end_row, end_column, index, r_multiplier, c_multiplier, my_pawn) – <text:span text:style-name="T12">zwraca planszę po ruchu damki.</text:span></text:p>
        </text:list-item>
        <text:list-item>
          <text:p text:style-name="P10">update_chart_plain(chart, field, checked_row, checked_column, my_pawn) – <text:span text:style-name="T12">zwraca planszę po dokonaniu </text:span><text:span text:style-name="T13">ruchu zwykłym pionkiem bez bicia</text:span><text:span text:style-name="T12">.</text:span></text:p>
        </text:list-item>
        <text:list-item>
          <text:p text:style-name="P14">if __name__ == "__main__": główna funkcja programu.</text:p>
          <text:p text:style-name="P1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20:52:33.864000607</meta:creation-date>
    <dc:date>2025-04-25T23:50:23.177366142</dc:date>
    <meta:editing-duration>PT56M28S</meta:editing-duration>
    <meta:editing-cycles>8</meta:editing-cycles>
    <meta:generator>LibreOffice/7.3.7.2$Linux_X86_64 LibreOffice_project/30$Build-2</meta:generator>
    <meta:document-statistic meta:table-count="0" meta:image-count="0" meta:object-count="0" meta:page-count="3" meta:paragraph-count="60" meta:word-count="1247" meta:character-count="9822" meta:non-whitespace-character-count="8629"/>
  </office:meta>
</office:document-meta>
</file>